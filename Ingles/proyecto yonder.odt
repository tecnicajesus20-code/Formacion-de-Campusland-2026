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05543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yecto de Yonder</text:p>
      <text:p text:style-name="Standard">Adquirir una Propiedad y ponerla a nombre de su señora madre.</text:p>
      <text:p text:style-name="Standard">E<text:span text:style-name="T1">EU</text:span>U in Miami,</text:p>
      <text:p text:style-name="Standard">Proyeccion = 5-10 años</text:p>
      <text:p text:style-name="Standard">Metas a corto plazo:</text:p>
      <text:list xml:id="list366324175" text:style-name="L1">
        <text:list-item>
          <text:p text:style-name="P1">Definir cantidad de habitaciones que se quiere tener en la casa</text:p>
        </text:list-item>
        <text:list-item>
          <text:p text:style-name="P1">Definir Locacion presisa.</text:p>
        </text:list-item>
        <text:list-item>
          <text:p text:style-name="P1">Investigar indices de seguridad de la zona elegida</text:p>
        </text:list-item>
        <text:list-item>
          <text:p text:style-name="P1">buscar en Google "Casas en venta en miami" y elegir 5.</text:p>
        </text:list-item>
        <text:list-item>
          <text:p text:style-name="P1">Contactarse con los vendedores.</text:p>
        </text:list-item>
        <text:list-item>
          <text:p text:style-name="P1">Plasmar en un excel la informacion antes consultada <text:span text:style-name="T1">con los vendedor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4:14:33.153006601</meta:creation-date>
    <dc:date>2026-04-15T14:17:49.077593116</dc:date>
    <meta:editing-duration>PT3M16S</meta:editing-duration>
    <meta:editing-cycles>1</meta:editing-cycles>
    <meta:document-statistic meta:table-count="0" meta:image-count="0" meta:object-count="0" meta:page-count="1" meta:paragraph-count="11" meta:word-count="79" meta:character-count="440" meta:non-whitespace-character-count="378"/>
    <meta:generator>LibreOffice/7.3.7.2$Linux_X86_64 LibreOffice_project/30$Build-2</meta:generator>
  </office:meta>
</office:document-meta>
</file>