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font-weight="bold"/>
    </style:style>
    <style:style style:name="P4" style:family="paragraph" style:parent-style-name="Text_20_body" style:list-style-name="L2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lgoritmo: Registro de Clientes</text:h>
      <text:list xml:id="list1306952234" text:style-name="L1">
        <text:list-item>
          <text:p text:style-name="P3">Inicio</text:p>
        </text:list-item>
        <text:list-item>
          <text:p text:style-name="P2"><text:span text:style-name="T1">Definir Estructura de Datos:</text:span> Crear un contenedor (como un diccionario, lista de objetos o tabla de base de datos) para almacenar los registros.</text:p>
        </text:list-item>
        <text:list-item>
          <text:p text:style-name="P3">Solicitar/Recibir Datos de Entrada:</text:p>
          <text:list>
            <text:list-item>
              <text:p text:style-name="P2"><text:span text:style-name="T1">ID:</text:span> Identificación única (Cédula, NIT o UUID).</text:p>
            </text:list-item>
            <text:list-item>
              <text:p text:style-name="P2"><text:span text:style-name="T1">Nombre:</text:span> Nombre completo o razón social.</text:p>
            </text:list-item>
            <text:list-item>
              <text:p text:style-name="P2"><text:span text:style-name="T1">Teléfono:</text:span> Número de contacto.</text:p>
            </text:list-item>
            <text:list-item>
              <text:p text:style-name="P2"><text:span text:style-name="T1">Correo:</text:span> Dirección de e-mail (validar formato <text:span text:style-name="Source_20_Text">@</text:span>).</text:p>
            </text:list-item>
          </text:list>
        </text:list-item>
        <text:list-item>
          <text:p text:style-name="P3">Validación de Integridad:</text:p>
          <text:list>
            <text:list-item>
              <text:p text:style-name="P2"><text:span text:style-name="T1">Verificar Duplicados:</text:span> Buscar si el <text:span text:style-name="T1">ID</text:span> ya existe en la base de datos.</text:p>
              <text:list>
                <text:list-item>
                  <text:p text:style-name="P2"><text:span text:style-name="T2">Si existe:</text:span> Mostrar error "El cliente ya está registrado" y finalizar.</text:p>
                </text:list-item>
                <text:list-item>
                  <text:p text:style-name="P2"><text:span text:style-name="T2">Si no existe:</text:span> Continuar.</text:p>
                </text:list-item>
              </text:list>
            </text:list-item>
            <text:list-item>
              <text:p text:style-name="P2"><text:span text:style-name="T1">Campos Obligatorios:</text:span> Confirmar que ninguno de los campos esté vacío.</text:p>
            </text:list-item>
          </text:list>
        </text:list-item>
        <text:list-item>
          <text:p text:style-name="P3">Procesamiento:</text:p>
          <text:list>
            <text:list-item>
              <text:p text:style-name="P2">Crear un nuevo registro con los datos validados.</text:p>
            </text:list-item>
            <text:list-item>
              <text:p text:style-name="P2">Insertar el registro en la estructura de datos principal.</text:p>
            </text:list-item>
          </text:list>
        </text:list-item>
        <text:list-item>
          <text:p text:style-name="P3">Confirmación:</text:p>
          <text:list>
            <text:list-item>
              <text:p text:style-name="P2">Retornar un mensaje de éxito: "Cliente [Nombre] registrado correctamente".</text:p>
            </text:list-item>
          </text:list>
        </text:list-item>
        <text:list-item>
          <text:p text:style-name="P3">Fin</text:p>
        </text:list-item>
      </text:list>
      <text:p text:style-name="Horizontal_20_Line"/>
      <text:h text:style-name="Heading_20_3" text:outline-level="3">Consideraciones para Facturación Legal</text:h>
      <text:p text:style-name="Text_20_body">Al diseñar la lógica, ten en cuenta estos puntos técnicos para que los datos sean útiles después:</text:p>
      <text:list xml:id="list2229113051" text:style-name="L2">
        <text:list-item>
          <text:p text:style-name="P4"><text:span text:style-name="T1">Tipado del ID:</text:span> Asegúrate de que el ID se guarde como una cadena de texto (<text:span text:style-name="T2">string</text:span>) si incluye letras o ceros a la izquierda, o como un entero largo si es puramente numérico.</text:p>
        </text:list-item>
        <text:list-item>
          <text:p text:style-name="P4"><text:span text:style-name="T1">Normalización:</text:span> Es recomendable convertir el <text:span text:style-name="T1">Correo</text:span> a minúsculas antes de guardarlo para evitar errores de búsqueda futuros.</text:p>
        </text:list-item>
        <text:list-item>
          <text:p text:style-name="P4"><text:span text:style-name="T1">Escalabilidad:</text:span> Si planeas usar esto en un entorno real, el algoritmo debería incluir un paso de "Persistencia", que consiste en guardar los datos en un archivo físico (como un <text:span text:style-name="Source_20_Text">.json</text:span> o <text:span text:style-name="Source_20_Text">.csv</text:span>) o una base de datos SQL para que no se pierdan al cerrar el programa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4:33:19.151162225</meta:creation-date>
    <dc:date>2026-04-07T14:33:33.199427703</dc:date>
    <meta:editing-duration>PT14S</meta:editing-duration>
    <meta:editing-cycles>1</meta:editing-cycles>
    <meta:document-statistic meta:table-count="0" meta:image-count="0" meta:object-count="0" meta:page-count="1" meta:paragraph-count="24" meta:word-count="265" meta:character-count="1557" meta:non-whitespace-character-count="1337"/>
    <meta:generator>LibreOffice/7.3.7.2$Linux_X86_64 LibreOffice_project/30$Build-2</meta:generator>
  </office:meta>
</office:document-meta>
</file>