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text-properties officeooo:paragraph-rsid="001035cd"/>
    </style:style>
    <style:style style:name="P2" style:family="paragraph" style:parent-style-name="Standard">
      <style:text-properties officeooo:paragraph-rsid="001035cd"/>
    </style:style>
    <style:style style:name="T1" style:family="text">
      <style:text-properties fo:background-color="#ffff00" loext:char-shading-value="0"/>
    </style:style>
    <style:style style:name="T2"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orking From Home vs. Working at the Office</text:p>
      <text:p text:style-name="Standard"/>
      <text:p text:style-name="Standard">After the pandemic, many companies changed the way people work. Some employees now work from home, while others <text:span text:style-name="T2">still</text:span> work in an office.</text:p>
      <text:p text:style-name="Standard"/>
      <text:p text:style-name="Standard">Julia works from home three days a week. She thinks working from home is more comfortable and less stressful than working at the office. She wakes up later, <text:span text:style-name="T2">spends</text:span> less money on transportation, and has <text:span text:style-name="T2">quieter</text:span> mornings.</text:p>
      <text:p text:style-name="Standard"/>
      <text:p text:style-name="Standard">Her friend Mateo prefers working at the office. He says the office is more professional and more organized. He also believes communication is easier because coworkers can talk face to face. Mateo feels more productive at the office than at home.</text:p>
      <text:p text:style-name="Standard"/>
      <text:p text:style-name="Standard">Julia <text:span text:style-name="T2">disagrees</text:span>. She says home is calmer and more flexible. She can eat healthier food and spend more time with her family. <text:span text:style-name="T2">However</text:span>, she admits that working from home can sometimes feel <text:span text:style-name="T2">lonelier</text:span>.</text:p>
      <text:p text:style-name="Standard"/>
      <text:p text:style-name="Standard">In the end, both Julia and Mateo agree that <text:span text:style-name="T2">each</text:span> option has advantages. They think the best solution is a flexible schedule with both home and office work.</text:p>
      <text:p text:style-name="Standard"/>
      <text:p text:style-name="Standard"/>
      <text:p text:style-name="P1">Still</text:p>
      <text:p text:style-name="P2">spends</text:p>
      <text:p text:style-name="P2">quieter</text:p>
      <text:p text:style-name="P2">disagrees</text:p>
      <text:p text:style-name="P2">However</text:p>
      <text:p text:style-name="P2">lonelier</text:p>
      <text:p text:style-name="P2">eac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6T17:59:24.137413758</meta:creation-date>
    <dc:date>2026-05-26T19:51:56.159109774</dc:date>
    <meta:editing-duration>PT1H42M22S</meta:editing-duration>
    <meta:editing-cycles>1</meta:editing-cycles>
    <meta:document-statistic meta:table-count="0" meta:image-count="0" meta:object-count="0" meta:page-count="2" meta:paragraph-count="13" meta:word-count="177" meta:character-count="1039" meta:non-whitespace-character-count="875"/>
    <meta:generator>LibreOffice/7.3.7.2$Linux_X86_64 LibreOffice_project/30$Build-2</meta:generator>
  </office:meta>
</office:document-meta>
</file>