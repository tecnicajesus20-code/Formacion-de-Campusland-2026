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120470B8A16E969F4C4.png" manifest:media-type="image/png"/>
  <manifest:file-entry manifest:full-path="Pictures/10000001000003910000009D1C016A9570057415.png" manifest:media-type="image/png"/>
  <manifest:file-entry manifest:full-path="Pictures/10000001000001CC000000EA1EF1F25F2A78391E.png" manifest:media-type="image/png"/>
  <manifest:file-entry manifest:full-path="Pictures/10000001000001A60000015C20FE5B88EFF2A48E.png" manifest:media-type="image/png"/>
  <manifest:file-entry manifest:full-path="Pictures/10000001000001C50000006F21DB84BF574F39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796" officeooo:paragraph-rsid="00102796"/>
    </style:style>
    <style:style style:name="P2" style:family="paragraph" style:parent-style-name="Standard">
      <style:text-properties officeooo:rsid="00112f61" officeooo:paragraph-rsid="00102796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Kleiderson Jesus Salcedo Rico // Yonder Daniel Maldonado Pabon <text:s/></text:p>
      <text:p text:style-name="P1"/>
      <text:p text:style-name="P1"><draw:frame draw:style-name="fr2" draw:name="Imagen1" text:anchor-type="char" svg:width="11.986cm" svg:height="2.937cm" draw:z-index="0"><draw:image xlink:href="Pictures/10000001000001C50000006F21DB84BF574F39A6.png" xlink:type="simple" xlink:show="embed" xlink:actuate="onLoad" draw:mime-type="image/png"/></draw:frame>Ejercicio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2.895cm" svg:y="0.45cm" svg:width="12.171cm" svg:height="6.191cm" draw:z-index="1"><draw:image xlink:href="Pictures/10000001000001CC000000EA1EF1F25F2A78391E.png" xlink:type="simple" xlink:show="embed" xlink:actuate="onLoad" draw:mime-type="image/png"/></draw:frame></text:p>
      <text:p text:style-name="P1">ejercici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1" draw:name="Imagen4" text:anchor-type="char" svg:x="2.194cm" svg:y="0.45cm" svg:width="17.395cm" svg:height="3.023cm" draw:z-index="3"><draw:image xlink:href="Pictures/10000001000003910000009D1C016A9570057415.png" xlink:type="simple" xlink:show="embed" xlink:actuate="onLoad" draw:mime-type="image/png"/></draw:frame></text:p>
      <text:p text:style-name="P1"/>
      <text:p text:style-name="P1"/>
      <text:p text:style-name="P1">ejercicio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5.144cm" svg:y="0.198cm" svg:width="11.165cm" svg:height="9.208cm" draw:z-index="2"><draw:image xlink:href="Pictures/10000001000001A60000015C20FE5B88EFF2A48E.png" xlink:type="simple" xlink:show="embed" xlink:actuate="onLoad" draw:mime-type="image/png"/></draw:frame></text:p>
      <text:p text:style-name="P1">ejercicio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jercicio 5 <text:s/><draw:frame draw:style-name="fr1" draw:name="Imagen5" text:anchor-type="char" svg:x="3.306cm" svg:y="-0.318cm" svg:width="14.631cm" svg:height="7.62cm" draw:z-index="4"><draw:image xlink:href="Pictures/100000010000022900000120470B8A16E969F4C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6:55:30.339881090</meta:creation-date>
    <dc:date>2026-03-11T17:02:31.911526006</dc:date>
    <meta:editing-duration>PT7M1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6" meta:word-count="19" meta:character-count="121" meta:non-whitespace-character-count="104"/>
  </office:meta>
</office:document-meta>
</file>